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">
      <style:graphic-properties draw:fill="solid" draw:fill-color="#ffffff" draw:opacity="100%" draw:stroke="solid" svg:stroke-width="0.01042in" svg:stroke-color="#dce2ec" svg:stroke-opacity="100%"/>
    </style:style>
    <style:style style:family="graphic" style:name="a162" style:parent-style-name="Graphics">
      <style:graphic-properties draw:fill="none" draw:stroke="none"/>
    </style:style>
    <style:style style:family="text" style:name="a163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">
      <style:graphic-properties draw:fill="solid" draw:fill-color="#ffffff" draw:opacity="100%" draw:stroke="solid" svg:stroke-width="0.01042in" svg:stroke-color="#dce2ec" svg:stroke-opacity="100%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">
      <style:graphic-properties draw:fill="solid" draw:fill-color="#7057e8" draw:opacity="100%" draw:stroke="none"/>
    </style:style>
    <style:style style:family="graphic" style:name="a293">
      <style:graphic-properties draw:fill="solid" draw:fill-color="#ffffff" draw:opacity="100%" draw:stroke="solid" svg:stroke-width="0.01042in" svg:stroke-color="#dce2ec" svg:stroke-opacity="100%"/>
    </style:style>
    <style:style style:family="text" style:name="a29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 style:parent-style-name="Graphics">
      <style:graphic-properties draw:fill="none" draw:stroke="none"/>
    </style:style>
    <style:style style:family="text" style:name="a171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0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solid" draw:fill-color="#ffffff" draw:opacity="100%" draw:stroke="solid" svg:stroke-width="0.01042in" svg:stroke-color="#dce2ec" svg:stroke-opacity="100%"/>
    </style:style>
    <style:style style:family="text" style:name="a50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 style:parent-style-name="Graphics">
      <style:graphic-properties draw:fill="none" draw:stroke="non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non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none"/>
    </style:style>
    <style:style style:family="graphic" style:name="a193">
      <style:graphic-properties draw:fill="solid" draw:fill-color="#7057e8" draw:opacity="100%" draw:stroke="non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">
      <style:graphic-properties draw:fill="solid" draw:fill-color="#f7f8fb" draw:opacity="100%" draw:stroke="solid" svg:stroke-width="0.01042in" svg:stroke-color="#dce2ec" svg:stroke-opacity="100%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draw:fill="solid" draw:fill-color="#7057e8" draw:opacity="100%" draw:stroke="non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4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5">
      <style:graphic-properties draw:fill="solid" draw:fill-color="#7057e8" draw:opacity="100%" draw:stroke="non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draw:fill="none" draw:stroke="non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5">
      <style:graphic-properties draw:fill="solid" draw:fill-color="#8ce6b5" draw:opacity="100%" draw:stroke="none"/>
    </style:style>
    <style:style style:family="text" style:name="a406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7708in" style:font-size-asian="0.67708in" style:font-size-complex="0.6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6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67708in" style:font-size-asian="0.67708in" style:font-size-complex="0.6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7057e8" draw:opacity="100%" draw:stroke="non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8125in" style:font-size-asian="0.28125in" style:font-size-complex="0.28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8125in" style:font-size-asian="0.28125in" style:font-size-complex="0.28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draw:fill="none" draw:stroke="non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3">
      <style:graphic-properties draw:fill="solid" draw:fill-color="#7057e8" draw:opacity="100%" draw:stroke="non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solid" draw:fill-color="#f1eeff" draw:opacity="100%" draw:stroke="none"/>
    </style:style>
    <style:style style:family="text" style:name="a4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e5484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e5484d" style:text-line-through-type="none" style:text-line-through-style="none" style:text-line-through-width="auto" style:text-line-through-color="font-color" style:text-position="0% 100%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eff9f4" draw:opacity="100%" draw:stroke="none"/>
    </style:style>
    <style:style style:family="text" style:name="a438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ffffff" draw:opacity="100%" draw:stroke="solid" svg:stroke-width="0.01042in" svg:stroke-color="#dce2ec" svg:stroke-opacity="100%"/>
    </style:style>
    <style:style style:family="text" style:name="a31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8124in, 0in, 0.03228in, 0in)" draw:stroke="none"/>
    </style:style>
    <style:style style:family="text" style:name="a316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">
      <style:graphic-properties draw:fill="solid" draw:fill-color="#22262d" draw:opacity="100%" draw:stroke="none"/>
    </style:style>
    <style:style style:family="text" style:name="a31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3">
      <style:graphic-properties draw:fill="none" draw:stroke="non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" style:parent-style-name="Graphics">
      <style:graphic-properties draw:fill="none" draw:stroke="none"/>
    </style:style>
    <style:style style:family="presentation" style:name="a325">
      <style:graphic-properties draw:fill="none" draw:stroke="non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">
      <style:graphic-properties draw:fill="solid" draw:fill-color="#7057e8" draw:opacity="100%" draw:stroke="non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208in" style:font-size-asian="0.30208in" style:font-size-complex="0.30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0208in" style:font-size-asian="0.30208in" style:font-size-complex="0.30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3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solid" draw:fill-color="#7057e8" draw:opacity="100%" draw:stroke="non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ddd7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6">
      <style:graphic-properties draw:fill="solid" draw:fill-color="#7057e8" draw:opacity="100%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dd7ff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solid" draw:fill-color="#f3f0ff" draw:opacity="100%" draw:stroke="non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60">
      <style:graphic-properties draw:fill="none" draw:stroke="non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solid" draw:fill-color="#8ce6b5" draw:opacity="100%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64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">
      <style:graphic-properties draw:fill="solid" draw:fill-color="#f7f8fb" draw:opacity="100%" draw:stroke="solid" svg:stroke-width="0.01042in" svg:stroke-color="#dce2ec" svg:stroke-opacity="100%"/>
    </style:style>
    <style:style style:family="graphic" style:name="a217">
      <style:graphic-properties draw:fill="solid" draw:fill-color="#4f8fea" draw:opacity="100%" draw:stroke="none"/>
    </style:style>
    <style:style style:family="text" style:name="a21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 style:parent-style-name="Graphics">
      <style:graphic-properties draw:fill="none" draw:stroke="none"/>
    </style:style>
    <style:style style:family="graphic" style:name="a92">
      <style:graphic-properties draw:fill="solid" draw:fill-color="#dcd6ff" draw:opacity="100%" draw:stroke="none"/>
    </style:style>
    <style:style style:family="presentation" style:name="a349">
      <style:graphic-properties draw:fill="none" draw:stroke="none"/>
    </style:style>
    <style:style style:family="text" style:name="a9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1">
      <style:graphic-properties draw:fill="solid" draw:fill-color="#7057e8" draw:opacity="100%" draw:stroke="non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solid" draw:fill-color="#ffffff" draw:opacity="100%" draw:stroke="solid" svg:stroke-width="0.01042in" svg:stroke-color="#dce2ec" svg:stroke-opacity="100%"/>
    </style:style>
    <style:style style:family="text" style:name="a9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solid" draw:fill-color="#8ce6b5" draw:opacity="100%" draw:stroke="none"/>
    </style:style>
    <style:style style:family="text" style:name="a47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3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solid" draw:fill-color="#ffffff" draw:opacity="100%" draw:stroke="solid" svg:stroke-width="0.01042in" svg:stroke-color="#dce2ec" svg:stroke-opacity="100%"/>
    </style:style>
    <style:style style:family="text" style:name="a482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solid" draw:fill-color="#dcd6ff" draw:opacity="100%" draw:stroke="non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solid" draw:fill-color="#f7f8fb" draw:opacity="100%" draw:stroke="solid" svg:stroke-width="0.01042in" svg:stroke-color="#dce2ec" svg:stroke-opacity="100%"/>
    </style:style>
    <style:style style:family="graphic" style:name="a236">
      <style:graphic-properties draw:fill="solid" draw:fill-color="#ff9b3f" draw:opacity="100%" draw:stroke="none"/>
    </style:style>
    <style:style style:family="text" style:name="a23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0">
      <style:graphic-properties draw:fill="solid" draw:fill-color="#7057e8" draw:opacity="100%" draw:stroke="none"/>
    </style:style>
    <style:style style:family="graphic" style:name="a361">
      <style:graphic-properties draw:fill="solid" draw:fill-color="#ffffff" draw:opacity="100%" draw:stroke="solid" svg:stroke-width="0.01042in" svg:stroke-color="#dce2ec" svg:stroke-opacity="100%"/>
    </style:style>
    <style:style style:family="graphic" style:name="a362">
      <style:graphic-properties draw:fill="solid" draw:fill-color="#7057e8" draw:opacity="100%" draw:stroke="none"/>
    </style:style>
    <style:style style:family="text" style:name="a36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0">
      <style:graphic-properties draw:fill="solid" draw:fill-color="#ffffff" draw:opacity="100%" draw:stroke="solid" svg:stroke-width="0.01042in" svg:stroke-color="#dce2ec" svg:stroke-opacity="100%"/>
    </style:style>
    <style:style style:family="text" style:name="a491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draw:fill="solid" draw:fill-color="#8ce6b5" draw:opacity="100%" draw:stroke="none"/>
    </style:style>
    <style:style style:family="text" style:name="a49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solid" draw:fill-color="#ffffff" draw:opacity="100%" draw:stroke="solid" svg:stroke-width="0.01042in" svg:stroke-color="#dce2ec" svg:stroke-opacity="100%"/>
    </style:style>
    <style:style style:family="text" style:name="a11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solid" draw:fill-color="#ffffff" draw:opacity="100%" draw:stroke="solid" svg:stroke-width="0.01042in" svg:stroke-color="#dce2ec" svg:stroke-opacity="100%"/>
    </style:style>
    <style:style style:family="graphic" style:name="a373">
      <style:graphic-properties draw:fill="solid" draw:fill-color="#8ce6b5" draw:opacity="100%" draw:stroke="none"/>
    </style:style>
    <style:style style:family="text" style:name="a37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draw:fill="solid" draw:fill-color="#f7f8fb" draw:opacity="100%" draw:stroke="solid" svg:stroke-width="0.01042in" svg:stroke-color="#dce2ec" svg:stroke-opacity="100%"/>
    </style:style>
    <style:style style:family="graphic" style:name="a256">
      <style:graphic-properties draw:fill="solid" draw:fill-color="#33b878" draw:opacity="100%" draw:stroke="none"/>
    </style:style>
    <style:style style:family="text" style:name="a25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solid" draw:fill-color="#ffffff" draw:opacity="100%" draw:stroke="solid" svg:stroke-width="0.01042in" svg:stroke-color="#dce2ec" svg:stroke-opacity="100%"/>
    </style:style>
    <style:style style:family="graphic" style:name="a384">
      <style:graphic-properties draw:fill="solid" draw:fill-color="#ff9b3f" draw:opacity="100%" draw:stroke="none"/>
    </style:style>
    <style:style style:family="text" style:name="a38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solid" draw:fill-color="#7057e8" draw:opacity="100%" draw:stroke="none"/>
    </style:style>
    <style:style style:family="graphic" style:name="a135">
      <style:graphic-properties draw:fill="solid" draw:fill-color="#f0f3f8" draw:opacity="100%" draw:stroke="none"/>
    </style:style>
    <style:style style:family="text" style:name="a13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 style:parent-style-name="Graphics">
      <style:graphic-properties draw:fill="none" draw:stroke="none"/>
    </style:style>
    <style:style style:family="presentation" style:name="a143">
      <style:graphic-properties draw:fill="none" draw:stroke="non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">
      <style:graphic-properties draw:fill="solid" draw:fill-color="#7057e8" draw:opacity="100%" draw:stroke="none"/>
    </style:style>
    <style:style style:family="text" style:name="a155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non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6" draw:master-page-name="Master1-Layout1-title-Title-Slide" presentation:presentation-page-layout-name="Master1-PPL1" draw:id="Slide-256">
        <draw:custom-shape svg:x="0in" svg:y="0in" svg:width="0.1875in" svg:height="7.5in" draw:id="id6" draw:style-name="a37" draw:name="Rechteck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125in" svg:y="0.78125in" svg:width="6.25in" svg:height="0.41667in" draw:id="id7" draw:style-name="a40" draw:name="Rechteck 1">
          <svg:title/>
          <svg:desc/>
          <text:p text:style-name="a39" text:class-names="" text:cond-style-name=""><text:span text:style-name="a38" text:class-names="">PK-TR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125in" svg:y="1.42708in" svg:width="6.77083in" svg:height="2.55208in" draw:id="id8" draw:style-name="a47" draw:name="Rechteck 2">
          <svg:title/>
          <svg:desc/>
          <text:p text:style-name="a42" text:class-names="" text:cond-style-name=""><text:span text:style-name="a41" text:class-names="">Finde Spots.</text:span></text:p>
          <text:p text:style-name="a44" text:class-names="" text:cond-style-name=""><text:span text:style-name="a43" text:class-names="">Meistere Challenges.</text:span></text:p>
          <text:p text:style-name="a46" text:class-names="" text:cond-style-name=""><text:span text:style-name="a45" text:class-names="">Verbessere deinen Flow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417in" svg:y="4.30208in" svg:width="4.16667in" svg:height="0.33333in" draw:id="id9" draw:style-name="a50" draw:name="Rechteck 3">
          <svg:title/>
          <svg:desc/>
          <text:p text:style-name="a49" text:class-names="" text:cond-style-name=""><text:span text:style-name="a48" text:class-names="">Projektpräsen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992in" svg:y="6.51042in" svg:width="5.17238in" svg:height="0.3125in" draw:id="id10" draw:style-name="a60" draw:name="Rechteck 4">
          <svg:title/>
          <svg:desc/>
          <text:p text:style-name="a59" text:class-names="" text:cond-style-name=""><text:span text:style-name="a51" text:class-names="">Nils Scharein </text:span><text:span text:style-name="a52" text:class-names=""><text:s text:c="1"/>· <text:s text:c="1"/></text:span><text:span text:style-name="a53" text:class-names="">Nikita Schmidt</text:span><text:span text:style-name="a54" text:class-names=""><text:s text:c="2"/>· <text:s text:c="1"/></text:span><text:span text:style-name="a55" text:class-names="">Ryu Siegert</text:span><text:span text:style-name="a56" text:class-names=""><text:s text:c="2"/>· <text:s text:c="1"/></text:span><text:span text:style-name="a57" text:class-names="">Mathis Luzzky</text:span><text:span text:style-name="a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167in" svg:y="0.54167in" svg:width="3.64583in" svg:height="6.47917in" draw:id="id11" draw:style-name="a61" draw:name="Rechteck: abgerundete Ecken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2" draw:style-name="a62" draw:name="Grafik 13" svg:x="8.97917in" svg:y="1.20786in" svg:width="2.77083in" svg:height="5.146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6">
          <draw:page-thumbnail draw:page-number="1" svg:x="0in" svg:y="0in" svg:width="0in" svg:height="0in" presentation:class="page" draw:id="id13" presentation:style-name="a63" draw:name="Slide Image Placeholder 1">
            <svg:title/>
            <svg:desc/>
          </draw:page-thumbnail>
          <draw:frame draw:id="id14" presentation:style-name="a6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5" presentation:style-name="a6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2" draw:style-name="a67" draw:master-page-name="Master1-Layout1-title-Title-Slide" presentation:presentation-page-layout-name="Master1-PPL1" draw:id="Slide-257">
        <draw:custom-shape svg:x="0.72917in" svg:y="0.44792in" svg:width="8.33333in" svg:height="0.27083in" draw:id="id16" draw:style-name="a70" draw:name="Rechteck 23">
          <svg:title/>
          <svg:desc/>
          <text:p text:style-name="a69" text:class-names="" text:cond-style-name=""><text:span text:style-name="a68" text:class-names="">PROJEKTID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7" draw:style-name="a73" draw:name="slide-title">
          <svg:title/>
          <svg:desc/>
          <text:p text:style-name="a72" text:class-names="" text:cond-style-name=""><text:span text:style-name="a71" text:class-names="">PK-Trace macht reale Trainingsspots nutzb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8" draw:style-name="a7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89583in" svg:width="7.1875in" svg:height="1.35417in" draw:id="id19" draw:style-name="a77" draw:name="Rechteck 3">
          <svg:title/>
          <svg:desc/>
          <text:p text:style-name="a76" text:class-names="" text:cond-style-name=""><text:span text:style-name="a75" text:class-names="">Wir helfen Traceuren, neue Trainingsideen zu finden und gemeinsam Challenges an realen Trainingsspots zu absolvieren - unabhängig vom Skill-Level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375in" svg:y="1.875in" svg:width="4.0625in" svg:height="1.33333in" draw:id="id20" draw:style-name="a78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7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77083in" svg:y="2.13542in" svg:width="3.38542in" svg:height="0.25in" draw:id="id21" draw:style-name="a81" draw:name="Rechteck 5">
          <svg:title/>
          <svg:desc/>
          <text:p text:style-name="a80" text:class-names="" text:cond-style-name=""><text:span text:style-name="a79" text:class-names="">VALUE PROPOS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7083in" svg:y="2.5in" svg:width="3.33333in" svg:height="0.58333in" draw:id="id22" draw:style-name="a84" draw:name="Rechteck 6">
          <svg:title/>
          <svg:desc/>
          <text:p text:style-name="a83" text:class-names="" text:cond-style-name=""><text:span text:style-name="a82" text:class-names="">Vom Ort zur konkreten Trainingsid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3.80208in" svg:width="0.54167in" svg:height="0.54167in" draw:id="id23" draw:style-name="a85" draw:name="Rechteck: abgerundete Ecken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3.875in" svg:width="0.54167in" svg:height="0.3125in" draw:id="id24" draw:style-name="a88" draw:name="Rechteck 8">
          <svg:title/>
          <svg:desc/>
          <text:p text:style-name="a87" text:class-names="" text:cond-style-name=""><text:span text:style-name="a86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3.85417in" svg:width="3.22917in" svg:height="0.5in" draw:id="id25" draw:style-name="a91" draw:name="Rechteck 9">
          <svg:title/>
          <svg:desc/>
          <text:p text:style-name="a90" text:class-names="" text:cond-style-name=""><text:span text:style-name="a89" text:class-names="">Neue Trainingsspots entdeck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4.65625in" svg:width="0.54167in" svg:height="0.54167in" draw:id="id26" draw:style-name="a92" draw:name="Rechteck: abgerundete Ecken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4.72917in" svg:width="0.54167in" svg:height="0.3125in" draw:id="id27" draw:style-name="a95" draw:name="Rechteck 11">
          <svg:title/>
          <svg:desc/>
          <text:p text:style-name="a94" text:class-names="" text:cond-style-name=""><text:span text:style-name="a93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4.70833in" svg:width="3.22917in" svg:height="0.5in" draw:id="id28" draw:style-name="a98" draw:name="Rechteck 12">
          <svg:title/>
          <svg:desc/>
          <text:p text:style-name="a97" text:class-names="" text:cond-style-name=""><text:span text:style-name="a96" text:class-names="">Ideen für jedes Skill-Lev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5.51042in" svg:width="0.54167in" svg:height="0.54167in" draw:id="id29" draw:style-name="a99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5.58333in" svg:width="0.54167in" svg:height="0.3125in" draw:id="id30" draw:style-name="a102" draw:name="Rechteck 14">
          <svg:title/>
          <svg:desc/>
          <text:p text:style-name="a101" text:class-names="" text:cond-style-name=""><text:span text:style-name="a100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5.5625in" svg:width="3.22917in" svg:height="0.5in" draw:id="id31" draw:style-name="a105" draw:name="Rechteck 15">
          <svg:title/>
          <svg:desc/>
          <text:p text:style-name="a104" text:class-names="" text:cond-style-name=""><text:span text:style-name="a103" text:class-names="">Regelmäßig durch Challenges trainier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25in" svg:y="3.80208in" svg:width="0.54167in" svg:height="0.54167in" draw:id="id32" draw:style-name="a106" draw:name="Rechteck: abgerundete Ecken 1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8125in" svg:y="3.875in" svg:width="0.54167in" svg:height="0.3125in" draw:id="id33" draw:style-name="a109" draw:name="Rechteck 17">
          <svg:title/>
          <svg:desc/>
          <text:p text:style-name="a108" text:class-names="" text:cond-style-name=""><text:span text:style-name="a107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083in" svg:y="3.85417in" svg:width="3.22917in" svg:height="0.5in" draw:id="id34" draw:style-name="a112" draw:name="Rechteck 18">
          <svg:title/>
          <svg:desc/>
          <text:p text:style-name="a111" text:class-names="" text:cond-style-name=""><text:span text:style-name="a110" text:class-names="">Ohne Registrierung direkt star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25in" svg:y="4.65625in" svg:width="0.54167in" svg:height="0.54167in" draw:id="id35" draw:style-name="a113" draw:name="Rechteck: abgerundete Ecken 1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8125in" svg:y="4.72917in" svg:width="0.54167in" svg:height="0.3125in" draw:id="id36" draw:style-name="a116" draw:name="Rechteck 20">
          <svg:title/>
          <svg:desc/>
          <text:p text:style-name="a115" text:class-names="" text:cond-style-name=""><text:span text:style-name="a114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083in" svg:y="4.70833in" svg:width="3.22917in" svg:height="0.5in" draw:id="id37" draw:style-name="a119" draw:name="Rechteck 21">
          <svg:title/>
          <svg:desc/>
          <text:p text:style-name="a118" text:class-names="" text:cond-style-name=""><text:span text:style-name="a117" text:class-names="">Fortschritt und Abschlüsse festhal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38" draw:style-name="a122" draw:name="Rechteck 22">
          <svg:title/>
          <svg:desc/>
          <text:p text:style-name="a121" text:class-names="" text:cond-style-name=""><text:span text:style-name="a120" text:class-names="">PK-Trace <text:s text:c="1"/>/ <text:s text:c="1"/>02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6">
          <draw:page-thumbnail draw:page-number="2" svg:x="0in" svg:y="0in" svg:width="0in" svg:height="0in" presentation:class="page" draw:id="id39" presentation:style-name="a123" draw:name="Slide Image Placeholder 1">
            <svg:title/>
            <svg:desc/>
          </draw:page-thumbnail>
          <draw:frame draw:id="id40" presentation:style-name="a12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41" presentation:style-name="a12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3" draw:style-name="a127" draw:master-page-name="Master1-Layout1-title-Title-Slide" presentation:presentation-page-layout-name="Master1-PPL1" draw:id="Slide-258">
        <draw:custom-shape svg:x="0.72917in" svg:y="0.44792in" svg:width="8.33333in" svg:height="0.27083in" draw:id="id42" draw:style-name="a130" draw:name="Rechteck 7">
          <svg:title/>
          <svg:desc/>
          <text:p text:style-name="a129" text:class-names="" text:cond-style-name=""><text:span text:style-name="a128" text:class-names="">USER JOURNE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43" draw:style-name="a133" draw:name="slide-title">
          <svg:title/>
          <svg:desc/>
          <text:p text:style-name="a132" text:class-names="" text:cond-style-name=""><text:span text:style-name="a131" text:class-names="">Eine Journey verbindet Onboarding, Spot und Challe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44" draw:style-name="a13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27083in" svg:width="11.875in" svg:height="0.64583in" draw:id="id45" draw:style-name="a135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1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1042in" svg:y="6.45833in" svg:width="11.30208in" svg:height="0.33333in" draw:id="id46" draw:style-name="a138" draw:name="Rechteck 5">
          <svg:title/>
          <svg:desc/>
          <text:p text:style-name="a137" text:class-names="" text:cond-style-name=""><text:span text:style-name="a136" text:class-names="">Ziel: schnell einen passenden Spot finden, eine Challenge starten und den Abschluss festhalte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47" draw:style-name="a141" draw:name="Rechteck 6">
          <svg:title/>
          <svg:desc/>
          <text:p text:style-name="a140" text:class-names="" text:cond-style-name=""><text:span text:style-name="a139" text:class-names="">PK-Trace <text:s text:c="1"/>/ <text:s text:c="1"/>03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draw:style-name="a142" draw:name="Grafik 10" svg:x="0.84in" svg:y="1.63639in" svg:width="11.64in" svg:height="4.2272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6">
          <draw:page-thumbnail draw:page-number="3" svg:x="0in" svg:y="0in" svg:width="0in" svg:height="0in" presentation:class="page" draw:id="id49" presentation:style-name="a143" draw:name="Slide Image Placeholder 1">
            <svg:title/>
            <svg:desc/>
          </draw:page-thumbnail>
          <draw:frame draw:id="id50" presentation:style-name="a14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51" presentation:style-name="a14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4" draw:style-name="a147" draw:master-page-name="Master1-Layout1-title-Title-Slide" presentation:presentation-page-layout-name="Master1-PPL1" draw:id="Slide-259">
        <draw:custom-shape svg:x="0.72917in" svg:y="0.44792in" svg:width="8.33333in" svg:height="0.27083in" draw:id="id52" draw:style-name="a150" draw:name="Rechteck 16">
          <svg:title/>
          <svg:desc/>
          <text:p text:style-name="a149" text:class-names="" text:cond-style-name=""><text:span text:style-name="a148" text:class-names="">UMGESETZTER ABLAU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53" draw:style-name="a153" draw:name="slide-title">
          <svg:title/>
          <svg:desc/>
          <text:p text:style-name="a152" text:class-names="" text:cond-style-name=""><text:span text:style-name="a151" text:class-names="">Die Journey führt Schritt für Schritt durch die 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54" draw:style-name="a15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77083in" svg:width="3.54167in" svg:height="0.33333in" draw:id="id55" draw:style-name="a157" draw:name="Rechteck 3">
          <svg:title/>
          <svg:desc/>
          <text:p text:style-name="a156" text:class-names="" text:cond-style-name=""><text:span text:style-name="a155" text:class-names="">1 <text:s text:c="1"/>Onboard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2.15625in" svg:width="3.54167in" svg:height="0.39583in" draw:id="id56" draw:style-name="a160" draw:name="Rechteck 4">
          <svg:title/>
          <svg:desc/>
          <text:p text:style-name="a159" text:class-names="" text:cond-style-name=""><text:span text:style-name="a158" text:class-names="">Skill einschätz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2.6875in" svg:width="3.54167in" svg:height="3.75in" draw:id="id57" draw:style-name="a161" draw:name="Rechteck: abgerundete Ecken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58" draw:style-name="a162" draw:name="Grafik 22" svg:x="1.58554in" svg:y="2.84375in" svg:width="1.82893in" svg:height="3.4375in" style:rel-width="scale" style:rel-height="scale">
          <draw:image xlink:href="media/image3.png" xlink:type="simple" xlink:show="embed" xlink:actuate="onLoad"/>
          <svg:title/>
          <svg:desc/>
        </draw:frame>
        <draw:custom-shape svg:x="4.89583in" svg:y="1.77083in" svg:width="3.54167in" svg:height="0.33333in" draw:id="id59" draw:style-name="a165" draw:name="Rechteck 7">
          <svg:title/>
          <svg:desc/>
          <text:p text:style-name="a164" text:class-names="" text:cond-style-name=""><text:span text:style-name="a163" text:class-names="">2 <text:s text:c="1"/>Spot im Fok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583in" svg:y="2.15625in" svg:width="3.54167in" svg:height="0.39583in" draw:id="id60" draw:style-name="a168" draw:name="Rechteck 8">
          <svg:title/>
          <svg:desc/>
          <text:p text:style-name="a167" text:class-names="" text:cond-style-name=""><text:span text:style-name="a166" text:class-names="">Spot ansehen und auswähl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583in" svg:y="2.6875in" svg:width="3.54167in" svg:height="3.75in" draw:id="id61" draw:style-name="a169" draw:name="Rechteck: abgerundete Ecken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2" draw:style-name="a170" draw:name="Grafik 26" svg:x="5.75597in" svg:y="2.84375in" svg:width="1.82139in" svg:height="3.4375in" style:rel-width="scale" style:rel-height="scale">
          <draw:image xlink:href="media/image4.png" xlink:type="simple" xlink:show="embed" xlink:actuate="onLoad"/>
          <svg:title/>
          <svg:desc/>
        </draw:frame>
        <draw:custom-shape svg:x="9.0625in" svg:y="1.77083in" svg:width="3.54167in" svg:height="0.33333in" draw:id="id63" draw:style-name="a173" draw:name="Rechteck 11">
          <svg:title/>
          <svg:desc/>
          <text:p text:style-name="a172" text:class-names="" text:cond-style-name=""><text:span text:style-name="a171" text:class-names="">3 <text:s text:c="1"/>Challenge im Fok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25in" svg:y="2.15625in" svg:width="3.54167in" svg:height="0.39583in" draw:id="id64" draw:style-name="a176" draw:name="Rechteck 12">
          <svg:title/>
          <svg:desc/>
          <text:p text:style-name="a175" text:class-names="" text:cond-style-name=""><text:span text:style-name="a174" text:class-names="">Challenge durchführen und abschließ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25in" svg:y="2.6875in" svg:width="3.54167in" svg:height="3.75in" draw:id="id65" draw:style-name="a177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6" draw:style-name="a178" draw:name="Grafik 30" svg:x="9.92018in" svg:y="2.84375in" svg:width="1.82631in" svg:height="3.4375in" style:rel-width="scale" style:rel-height="scale">
          <draw:image xlink:href="media/image5.png" xlink:type="simple" xlink:show="embed" xlink:actuate="onLoad"/>
          <svg:title/>
          <svg:desc/>
        </draw:frame>
        <draw:custom-shape svg:x="10.67708in" svg:y="7.10417in" svg:width="1.92708in" svg:height="0.1875in" draw:id="id67" draw:style-name="a181" draw:name="Rechteck 15">
          <svg:title/>
          <svg:desc/>
          <text:p text:style-name="a180" text:class-names="" text:cond-style-name=""><text:span text:style-name="a179" text:class-names="">PK-Trace <text:s text:c="1"/>/ <text:s text:c="1"/>04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5">
          <draw:page-thumbnail draw:page-number="4" svg:x="0in" svg:y="0in" svg:width="0in" svg:height="0in" presentation:class="page" draw:id="id68" presentation:style-name="a182" draw:name="Slide Image Placeholder 1">
            <svg:title/>
            <svg:desc/>
          </draw:page-thumbnail>
          <draw:frame draw:id="id69" presentation:style-name="a183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70" presentation:style-name="a184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5" draw:style-name="a186" draw:master-page-name="Master1-Layout1-title-Title-Slide" presentation:presentation-page-layout-name="Master1-PPL1" draw:id="Slide-260">
        <draw:custom-shape svg:x="0.72917in" svg:y="0.44792in" svg:width="8.33333in" svg:height="0.27083in" draw:id="id71" draw:style-name="a189" draw:name="Rechteck 25">
          <svg:title/>
          <svg:desc/>
          <text:p text:style-name="a188" text:class-names="" text:cond-style-name=""><text:span text:style-name="a187" text:class-names="">TE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72" draw:style-name="a192" draw:name="slide-title">
          <svg:title/>
          <svg:desc/>
          <text:p text:style-name="a191" text:class-names="" text:cond-style-name=""><text:span text:style-name="a190" text:class-names="">Vier Full-Stack-Entwickler mit klaren Schwerpunk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73" draw:style-name="a193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2292in" svg:width="2.83333in" svg:height="4.42708in" draw:id="id74" draw:style-name="a194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1.82292in" svg:width="2.83333in" svg:height="0.10417in" draw:id="id75" draw:style-name="a195" draw:name="Rechteck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2.20833in" svg:width="2.29167in" svg:height="0.5in" draw:id="id76" draw:style-name="a199" draw:name="Rechteck 5">
          <svg:title/>
          <svg:desc/>
          <text:p text:style-name="a198" text:class-names="" text:cond-style-name=""><text:span text:style-name="a196" text:class-names="">Nils Scharein</text:span><text:span text:style-name="a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2.97917in" svg:width="2.34375in" svg:height="2.55208in" draw:id="id77" draw:style-name="a212" draw:name="Rechteck 6">
          <svg:title/>
          <svg:desc/>
          <text:p text:style-name="a201" text:class-names="" text:cond-style-name=""><text:span text:style-name="a200" text:class-names="">SkillWizard</text:span></text:p>
          <text:p text:style-name="a203" text:class-names="" text:cond-style-name=""><text:span text:style-name="a202" text:class-names="">Mapbox</text:span></text:p>
          <text:p text:style-name="a205" text:class-names="" text:cond-style-name=""><text:span text:style-name="a204" text:class-names="">Mapillary (Pair mit NiS)</text:span></text:p>
          <text:p text:style-name="a207" text:class-names="" text:cond-style-name=""><text:span text:style-name="a206" text:class-names="">Dark Mode</text:span></text:p>
          <text:p text:style-name="a209" text:class-names="" text:cond-style-name=""><text:span text:style-name="a208" text:class-names="">Spots-Layout</text:span></text:p>
          <text:p text:style-name="a211" text:class-names="" text:cond-style-name=""><text:span text:style-name="a210" text:class-names="">UserDb-Hooks / Prof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5.76042in" svg:width="1.875in" svg:height="0.29167in" draw:id="id78" draw:style-name="a215" draw:name="Rechteck 7">
          <svg:title/>
          <svg:desc/>
          <text:p text:style-name="a214" text:class-names="" text:cond-style-name=""><text:span text:style-name="a213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333in" svg:y="1.82292in" svg:width="2.83333in" svg:height="4.42708in" draw:id="id79" draw:style-name="a216" draw:name="Rechteck: abgerundete Ecken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83333in" svg:y="1.82292in" svg:width="2.83333in" svg:height="0.10417in" draw:id="id80" draw:style-name="a217" draw:name="Rechteck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2.20833in" svg:width="2.29167in" svg:height="0.5in" draw:id="id81" draw:style-name="a220" draw:name="Rechteck 10">
          <svg:title/>
          <svg:desc/>
          <text:p text:style-name="a219" text:class-names="" text:cond-style-name=""><text:span text:style-name="a218" text:class-names="">Nikita Schmid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2.97917in" svg:width="2.34375in" svg:height="2.55208in" draw:id="id82" draw:style-name="a231" draw:name="Rechteck 11">
          <svg:title/>
          <svg:desc/>
          <text:p text:style-name="a222" text:class-names="" text:cond-style-name=""><text:span text:style-name="a221" text:class-names="">Challenge Pages</text:span></text:p>
          <text:p text:style-name="a224" text:class-names="" text:cond-style-name=""><text:span text:style-name="a223" text:class-names="">Persistenz in localStorage</text:span></text:p>
          <text:p text:style-name="a226" text:class-names="" text:cond-style-name=""><text:span text:style-name="a225" text:class-names="">UserDb-Hooks / Persistenz</text:span></text:p>
          <text:p text:style-name="a228" text:class-names="" text:cond-style-name=""><text:span text:style-name="a227" text:class-names="">Mapillary (Pair mit NS)</text:span></text:p>
          <text:p text:style-name="a230" text:class-names="" text:cond-style-name=""><text:span text:style-name="a229" text:class-names="">Bugs und 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5.76042in" svg:width="1.875in" svg:height="0.29167in" draw:id="id83" draw:style-name="a234" draw:name="Rechteck 12">
          <svg:title/>
          <svg:desc/>
          <text:p text:style-name="a233" text:class-names="" text:cond-style-name=""><text:span text:style-name="a232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75in" svg:y="1.82292in" svg:width="2.83333in" svg:height="4.42708in" draw:id="id84" draw:style-name="a235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375in" svg:y="1.82292in" svg:width="2.83333in" svg:height="0.10417in" draw:id="id85" draw:style-name="a236" draw:name="Rechteck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2.20833in" svg:width="2.29167in" svg:height="0.5in" draw:id="id86" draw:style-name="a240" draw:name="Rechteck 15">
          <svg:title/>
          <svg:desc/>
          <text:p text:style-name="a239" text:class-names="" text:cond-style-name=""><text:span text:style-name="a237" text:class-names="">Ryu Siegert</text:span><text:span text:style-name="a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2.97917in" svg:width="2.34375in" svg:height="2.55208in" draw:id="id87" draw:style-name="a251" draw:name="Rechteck 16">
          <svg:title/>
          <svg:desc/>
          <text:p text:style-name="a242" text:class-names="" text:cond-style-name=""><text:span text:style-name="a241" text:class-names="">Spots und Übersichten</text:span></text:p>
          <text:p text:style-name="a244" text:class-names="" text:cond-style-name=""><text:span text:style-name="a243" text:class-names="">Challenge-Übersichten</text:span></text:p>
          <text:p text:style-name="a246" text:class-names="" text:cond-style-name=""><text:span text:style-name="a245" text:class-names="">Farben und Inhalte</text:span></text:p>
          <text:p text:style-name="a248" text:class-names="" text:cond-style-name=""><text:span text:style-name="a247" text:class-names="">SkillWizard-Fragen</text:span></text:p>
          <text:p text:style-name="a250" text:class-names="" text:cond-style-name=""><text:span text:style-name="a249" text:class-names="">Product-Owner-Entscheid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5.76042in" svg:width="1.875in" svg:height="0.29167in" draw:id="id88" draw:style-name="a254" draw:name="Rechteck 17">
          <svg:title/>
          <svg:desc/>
          <text:p text:style-name="a253" text:class-names="" text:cond-style-name=""><text:span text:style-name="a252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167in" svg:y="1.82292in" svg:width="2.83333in" svg:height="4.42708in" draw:id="id89" draw:style-name="a255" draw:name="Rechteck: abgerundete Ecken 1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04167in" svg:y="1.82292in" svg:width="2.83333in" svg:height="0.10417in" draw:id="id90" draw:style-name="a256" draw:name="Rechteck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9167in" svg:y="2.20833in" svg:width="2.29167in" svg:height="0.5in" draw:id="id91" draw:style-name="a260" draw:name="Rechteck 20">
          <svg:title/>
          <svg:desc/>
          <text:p text:style-name="a259" text:class-names="" text:cond-style-name=""><text:span text:style-name="a257" text:class-names="">Mathis Luzzky</text:span><text:span text:style-name="a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9167in" svg:y="2.97917in" svg:width="2.34375in" svg:height="2.55208in" draw:id="id92" draw:style-name="a271" draw:name="Rechteck 21">
          <svg:title/>
          <svg:desc/>
          <text:p text:style-name="a262" text:class-names="" text:cond-style-name=""><text:span text:style-name="a261" text:class-names="">Startbildschirm</text:span></text:p>
          <text:p text:style-name="a264" text:class-names="" text:cond-style-name=""><text:span text:style-name="a263" text:class-names="">SkillWizard im Profil</text:span></text:p>
          <text:p text:style-name="a266" text:class-names="" text:cond-style-name=""><text:span text:style-name="a265" text:class-names="">Navigations-Guard</text:span></text:p>
          <text:p text:style-name="a268" text:class-names="" text:cond-style-name=""><text:span text:style-name="a267" text:class-names="">Startseiten-Layout</text:span></text:p>
          <text:p text:style-name="a270" text:class-names="" text:cond-style-name=""><text:span text:style-name="a269" text:class-names="">Bugs und 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9167in" svg:y="5.76042in" svg:width="1.875in" svg:height="0.29167in" draw:id="id93" draw:style-name="a274" draw:name="Rechteck 22">
          <svg:title/>
          <svg:desc/>
          <text:p text:style-name="a273" text:class-names="" text:cond-style-name=""><text:span text:style-name="a272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94" draw:style-name="a277" draw:name="Rechteck 23">
          <svg:title/>
          <svg:desc/>
          <text:p text:style-name="a276" text:class-names="" text:cond-style-name=""><text:span text:style-name="a275" text:class-names="">Gemeinsam: Workflow-Bugs, CSS-Details, Scrolling, Maße und Refactoring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95" draw:style-name="a280" draw:name="Rechteck 24">
          <svg:title/>
          <svg:desc/>
          <text:p text:style-name="a279" text:class-names="" text:cond-style-name=""><text:span text:style-name="a278" text:class-names="">PK-Trace <text:s text:c="1"/>/ <text:s text:c="1"/>05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84">
          <draw:page-thumbnail draw:page-number="5" svg:x="0in" svg:y="0in" svg:width="0in" svg:height="0in" presentation:class="page" draw:id="id96" presentation:style-name="a281" draw:name="Slide Image Placeholder 1">
            <svg:title/>
            <svg:desc/>
          </draw:page-thumbnail>
          <draw:frame draw:id="id97" presentation:style-name="a282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98" presentation:style-name="a283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6" draw:style-name="a285" draw:master-page-name="Master1-Layout1-title-Title-Slide" presentation:presentation-page-layout-name="Master1-PPL1" draw:id="Slide-261">
        <draw:custom-shape svg:x="0.72917in" svg:y="0.44792in" svg:width="8.33333in" svg:height="0.27083in" draw:id="id99" draw:style-name="a288" draw:name="Rechteck 13">
          <svg:title/>
          <svg:desc/>
          <text:p text:style-name="a287" text:class-names="" text:cond-style-name=""><text:span text:style-name="a286" text:class-names="">ZUSAMMENARB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00" draw:style-name="a291" draw:name="slide-title">
          <svg:title/>
          <svg:desc/>
          <text:p text:style-name="a290" text:class-names="" text:cond-style-name=""><text:span text:style-name="a289" text:class-names="">Miro steuerte die Aufgaben, GitHub den Co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01" draw:style-name="a292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3125in" svg:height="4.21875in" draw:id="id102" draw:style-name="a293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5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2.15625in" svg:width="4.16667in" svg:height="0.375in" draw:id="id103" draw:style-name="a296" draw:name="Rechteck 4">
          <svg:title/>
          <svg:desc/>
          <text:p text:style-name="a295" text:class-names="" text:cond-style-name=""><text:span text:style-name="a294" text:class-names="">Arbeitswei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2.76042in" svg:width="4.47917in" svg:height="2.60417in" draw:id="id104" draw:style-name="a307" draw:name="Rechteck 5">
          <svg:title/>
          <svg:desc/>
          <text:p text:style-name="a298" text:class-names="" text:cond-style-name=""><text:span text:style-name="a297" text:class-names="">- Zu Beginn eigene Branches für den Grundaufbau</text:span></text:p>
          <text:p text:style-name="a300" text:class-names="" text:cond-style-name=""><text:span text:style-name="a299" text:class-names="">- Danach stabiler main-Branch und gemeinsamer dev-Branch</text:span></text:p>
          <text:p text:style-name="a302" text:class-names="" text:cond-style-name=""><text:span text:style-name="a301" text:class-names="">- TODOs wurden auf dem Miro-Board gewählt und markiert</text:span></text:p>
          <text:p text:style-name="a304" text:class-names="" text:cond-style-name=""><text:span text:style-name="a303" text:class-names="">- Live-Code-Reviews nach Pushes über Discord</text:span></text:p>
          <text:p text:style-name="a306" text:class-names="" text:cond-style-name=""><text:span text:style-name="a305" text:class-names="">- 2-3 größere Merge-Konflikte gemeinsam gelö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5.57292in" svg:width="4.47917in" svg:height="0.29167in" draw:id="id105" draw:style-name="a310" draw:name="Rechteck 6">
          <svg:title/>
          <svg:desc/>
          <text:p text:style-name="a309" text:class-names="" text:cond-style-name=""><text:span text:style-name="a308" text:class-names="">GitHub Projects / Issues wurden nicht genutz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833in" svg:y="1.85417in" svg:width="6.14583in" svg:height="4.21875in" draw:id="id106" draw:style-name="a311" draw:name="Rechteck: abgerundete Ecken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5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77083in" svg:y="2.15625in" svg:width="5.20833in" svg:height="0.375in" draw:id="id107" draw:style-name="a314" draw:name="Rechteck 8">
          <svg:title/>
          <svg:desc/>
          <text:p text:style-name="a313" text:class-names="" text:cond-style-name=""><text:span text:style-name="a312" text:class-names="">Status auf dem Miro-Boa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315" draw:name="Grafik 22" svg:x="6.77083in" svg:y="2.60603in" svg:width="5.3125in" svg:height="0.73681in" style:rel-width="scale" style:rel-height="scale">
          <draw:image xlink:href="media/image6.png" xlink:type="simple" xlink:show="embed" xlink:actuate="onLoad"/>
          <svg:title/>
          <svg:desc/>
        </draw:frame>
        <draw:custom-shape svg:x="6.77083in" svg:y="5.78125in" svg:width="5.3125in" svg:height="0.25in" draw:id="id109" draw:style-name="a320" draw:name="Rechteck 11">
          <svg:title/>
          <svg:desc/>
          <text:p text:style-name="a319" text:class-names="" text:cond-style-name=""><text:span text:style-name="a316" text:class-names="">Miro-Link:<text:s text:c="1"/></text:span><text:span text:style-name="a317" text:class-names="">https://miro.com/app/board/uXjVHP3MJ_A=/</text:span><text:span text:style-name="a3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10" draw:style-name="a323" draw:name="Rechteck 12">
          <svg:title/>
          <svg:desc/>
          <text:p text:style-name="a322" text:class-names="" text:cond-style-name=""><text:span text:style-name="a321" text:class-names="">PK-Trace <text:s text:c="1"/>/ <text:s text:c="1"/>06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324" draw:name="Grafik 9" svg:x="6.78667in" svg:y="3.46369in" svg:width="5.28in" svg:height="2.3259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328">
          <draw:page-thumbnail draw:page-number="6" svg:x="0in" svg:y="0in" svg:width="0in" svg:height="0in" presentation:class="page" draw:id="id112" presentation:style-name="a325" draw:name="Slide Image Placeholder 1">
            <svg:title/>
            <svg:desc/>
          </draw:page-thumbnail>
          <draw:frame draw:id="id113" presentation:style-name="a326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14" presentation:style-name="a327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7" draw:style-name="a329" draw:master-page-name="Master1-Layout1-title-Title-Slide" presentation:presentation-page-layout-name="Master1-PPL1" draw:id="Slide-262">
        <draw:custom-shape svg:x="0.72917in" svg:y="0.44792in" svg:width="8.33333in" svg:height="0.27083in" draw:id="id115" draw:style-name="a332" draw:name="Rechteck 8">
          <svg:title/>
          <svg:desc/>
          <text:p text:style-name="a331" text:class-names="" text:cond-style-name=""><text:span text:style-name="a330" text:class-names="">ITE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16" draw:style-name="a335" draw:name="slide-title">
          <svg:title/>
          <svg:desc/>
          <text:p text:style-name="a334" text:class-names="" text:cond-style-name=""><text:span text:style-name="a333" text:class-names="">Die Wireframes wurden entlang der Journey konkretisier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17" draw:style-name="a336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337" draw:name="Grafik 11" svg:x="0.72917in" svg:y="2.1354in" svg:width="11.875in" svg:height="2.95837in" style:rel-width="scale" style:rel-height="scale">
          <draw:image xlink:href="media/image8.png" xlink:type="simple" xlink:show="embed" xlink:actuate="onLoad"/>
          <svg:title/>
          <svg:desc/>
        </draw:frame>
        <draw:custom-shape svg:x="0.72917in" svg:y="5.70833in" svg:width="11.875in" svg:height="1.04167in" draw:id="id119" draw:style-name="a338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59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5.95833in" svg:width="11.25in" svg:height="0.58333in" draw:id="id120" draw:style-name="a341" draw:name="Rechteck 5">
          <svg:title/>
          <svg:desc/>
          <text:p text:style-name="a340" text:class-names="" text:cond-style-name=""><text:span text:style-name="a339" text:class-names="">Wireframes klärten zuerst Platzierung und Funktion. Design und Details wurden anschließend im Frontend anhand von Feedback weiterentwickel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0417in" svg:y="6.77083in" svg:width="2.5in" svg:height="0.20833in" draw:id="id121" draw:style-name="a344" draw:name="Rechteck 6">
          <svg:title/>
          <svg:desc/>
          <text:p text:style-name="a343" text:class-names="" text:cond-style-name=""><text:span text:style-name="a342" text:class-names="">Miro-Link: [einfüge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22" draw:style-name="a347" draw:name="Rechteck 7">
          <svg:title/>
          <svg:desc/>
          <text:p text:style-name="a346" text:class-names="" text:cond-style-name=""><text:span text:style-name="a345" text:class-names="">PK-Trace <text:s text:c="1"/>/ <text:s text:c="1"/>07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348" draw:name="Grafik 3" svg:x="0in" svg:y="1.57421in" svg:width="13.33333in" svg:height="4.35159in" style:rel-width="scale" style:rel-height="scale">
          <draw:image xlink:href="media/image9.jpeg" xlink:type="simple" xlink:show="embed" xlink:actuate="onLoad"/>
          <svg:title/>
          <svg:desc/>
        </draw:frame>
        <presentation:notes draw:style-name="a352">
          <draw:page-thumbnail draw:page-number="7" svg:x="0in" svg:y="0in" svg:width="0in" svg:height="0in" presentation:class="page" draw:id="id124" presentation:style-name="a349" draw:name="Slide Image Placeholder 1">
            <svg:title/>
            <svg:desc/>
          </draw:page-thumbnail>
          <draw:frame draw:id="id125" presentation:style-name="a350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26" presentation:style-name="a351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8" draw:style-name="a353" draw:master-page-name="Master1-Layout1-title-Title-Slide" presentation:presentation-page-layout-name="Master1-PPL1" draw:id="Slide-263">
        <draw:custom-shape svg:x="0.72917in" svg:y="0.44792in" svg:width="8.33333in" svg:height="0.27083in" draw:id="id127" draw:style-name="a356" draw:name="Rechteck 20">
          <svg:title/>
          <svg:desc/>
          <text:p text:style-name="a355" text:class-names="" text:cond-style-name=""><text:span text:style-name="a354" text:class-names="">TECHNISCHE HERAUSFORDER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28" draw:style-name="a359" draw:name="slide-title">
          <svg:title/>
          <svg:desc/>
          <text:p text:style-name="a358" text:class-names="" text:cond-style-name=""><text:span text:style-name="a357" text:class-names="">Die größten Hürden waren neue Denkmodelle - nicht einzelne Bu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29" draw:style-name="a360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11.875in" svg:height="1.22917in" draw:id="id130" draw:style-name="a361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1.85417in" svg:width="0.14583in" svg:height="1.22917in" draw:id="id131" draw:style-name="a362" draw:name="Rechteck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2.08333in" svg:width="2.8125in" svg:height="0.375in" draw:id="id132" draw:style-name="a365" draw:name="Rechteck 5">
          <svg:title/>
          <svg:desc/>
          <text:p text:style-name="a364" text:class-names="" text:cond-style-name=""><text:span text:style-name="a363" text:class-names="">React unter Zeitdru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2.05208in" svg:width="3.75in" svg:height="0.72917in" draw:id="id133" draw:style-name="a368" draw:name="Rechteck 6">
          <svg:title/>
          <svg:desc/>
          <text:p text:style-name="a367" text:class-names="" text:cond-style-name=""><text:span text:style-name="a366" text:class-names="">Hooks und async korrekt anwend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2.05208in" svg:width="4.01042in" svg:height="0.78125in" draw:id="id134" draw:style-name="a371" draw:name="Rechteck 7">
          <svg:title/>
          <svg:desc/>
          <text:p text:style-name="a370" text:class-names="" text:cond-style-name=""><text:span text:style-name="a369" text:class-names="">Dokumentation lesen, Konzepte erklären lassen und iterativ tes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3.36458in" svg:width="11.875in" svg:height="1.22917in" draw:id="id135" draw:style-name="a372" draw:name="Rechteck: abgerundete Ecken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3.36458in" svg:width="0.14583in" svg:height="1.22917in" draw:id="id136" draw:style-name="a373" draw:name="Rechteck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59375in" svg:width="2.8125in" svg:height="0.375in" draw:id="id137" draw:style-name="a376" draw:name="Rechteck 10">
          <svg:title/>
          <svg:desc/>
          <text:p text:style-name="a375" text:class-names="" text:cond-style-name=""><text:span text:style-name="a374" text:class-names="">In Komponenten denk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3.5625in" svg:width="3.75in" svg:height="0.72917in" draw:id="id138" draw:style-name="a379" draw:name="Rechteck 11">
          <svg:title/>
          <svg:desc/>
          <text:p text:style-name="a378" text:class-names="" text:cond-style-name=""><text:span text:style-name="a377" text:class-names="">Parent-Child-Beziehungen und Zuständigkeiten sauber trenn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3.5625in" svg:width="4.01042in" svg:height="0.78125in" draw:id="id139" draw:style-name="a382" draw:name="Rechteck 12">
          <svg:title/>
          <svg:desc/>
          <text:p text:style-name="a381" text:class-names="" text:cond-style-name=""><text:span text:style-name="a380" text:class-names="">Wiederverwendbare Komponenten und klarere Datenflüs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4.875in" svg:width="11.875in" svg:height="1.22917in" draw:id="id140" draw:style-name="a383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4.875in" svg:width="0.14583in" svg:height="1.22917in" draw:id="id141" draw:style-name="a384" draw:name="Rechteck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5.10417in" svg:width="2.8125in" svg:height="0.375in" draw:id="id142" draw:style-name="a387" draw:name="Rechteck 15">
          <svg:title/>
          <svg:desc/>
          <text:p text:style-name="a386" text:class-names="" text:cond-style-name=""><text:span text:style-name="a385" text:class-names="">APIs und Layo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5.07292in" svg:width="3.75in" svg:height="0.72917in" draw:id="id143" draw:style-name="a390" draw:name="Rechteck 16">
          <svg:title/>
          <svg:desc/>
          <text:p text:style-name="a389" text:class-names="" text:cond-style-name=""><text:span text:style-name="a388" text:class-names="">Mapbox / Mapillary integrieren und CSS verlässlich beherrsch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5.07292in" svg:width="4.01042in" svg:height="0.78125in" draw:id="id144" draw:style-name="a393" draw:name="Rechteck 17">
          <svg:title/>
          <svg:desc/>
          <text:p text:style-name="a392" text:class-names="" text:cond-style-name=""><text:span text:style-name="a391" text:class-names="">Fremde APIs anbinden - und Geduld beim Zentrieren von Butt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145" draw:style-name="a396" draw:name="Rechteck 18">
          <svg:title/>
          <svg:desc/>
          <text:p text:style-name="a395" text:class-names="" text:cond-style-name=""><text:span text:style-name="a394" text:class-names="">Learning: React, externe APIs und saubere Komponentenarchitektur brauchen vor allem Übung und Zei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46" draw:style-name="a399" draw:name="Rechteck 19">
          <svg:title/>
          <svg:desc/>
          <text:p text:style-name="a398" text:class-names="" text:cond-style-name=""><text:span text:style-name="a397" text:class-names="">PK-Trace <text:s text:c="1"/>/ <text:s text:c="1"/>08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03">
          <draw:page-thumbnail draw:page-number="8" svg:x="0in" svg:y="0in" svg:width="0in" svg:height="0in" presentation:class="page" draw:id="id147" presentation:style-name="a400" draw:name="Slide Image Placeholder 1">
            <svg:title/>
            <svg:desc/>
          </draw:page-thumbnail>
          <draw:frame draw:id="id148" presentation:style-name="a401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49" presentation:style-name="a402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9" draw:style-name="a404" draw:master-page-name="Master1-Layout1-title-Title-Slide" presentation:presentation-page-layout-name="Master1-PPL1" draw:id="Slide-264">
        <draw:custom-shape svg:x="0in" svg:y="0in" svg:width="0.1875in" svg:height="7.5in" draw:id="id150" draw:style-name="a405" draw:name="Rechteck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2.44792in" svg:width="11.66667in" svg:height="0.625in" draw:id="id151" draw:style-name="a408" draw:name="Rechteck 1">
          <svg:title/>
          <svg:desc/>
          <text:p text:style-name="a407" text:class-names="" text:cond-style-name=""><text:span text:style-name="a406" text:class-names="">JETZ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3.15625in" svg:width="11.66667in" svg:height="1.04167in" draw:id="id152" draw:style-name="a411" draw:name="Rechteck 2">
          <svg:title/>
          <svg:desc/>
          <text:p text:style-name="a410" text:class-names="" text:cond-style-name=""><text:span text:style-name="a409" text:class-names="">LIVE DEMO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5">
          <draw:page-thumbnail draw:page-number="9" svg:x="0in" svg:y="0in" svg:width="0in" svg:height="0in" presentation:class="page" draw:id="id153" presentation:style-name="a412" draw:name="Slide Image Placeholder 1">
            <svg:title/>
            <svg:desc/>
          </draw:page-thumbnail>
          <draw:frame draw:id="id154" presentation:style-name="a413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55" presentation:style-name="a414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0" draw:style-name="a416" draw:master-page-name="Master1-Layout1-title-Title-Slide" presentation:presentation-page-layout-name="Master1-PPL1" draw:id="Slide-265">
        <draw:custom-shape svg:x="0.72917in" svg:y="0.44792in" svg:width="8.33333in" svg:height="0.27083in" draw:id="id156" draw:style-name="a419" draw:name="Rechteck 11">
          <svg:title/>
          <svg:desc/>
          <text:p text:style-name="a418" text:class-names="" text:cond-style-name=""><text:span text:style-name="a417" text:class-names="">AUSBLI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57" draw:style-name="a422" draw:name="slide-title">
          <svg:title/>
          <svg:desc/>
          <text:p text:style-name="a421" text:class-names="" text:cond-style-name=""><text:span text:style-name="a420" text:class-names="">Für einen Launch fehlen vor allem Inhalte und ein UGC-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58" draw:style-name="a423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67708in" svg:height="4.375in" draw:id="id159" draw:style-name="a424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2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8333in" svg:y="2.20833in" svg:width="4.84375in" svg:height="0.29167in" draw:id="id160" draw:style-name="a427" draw:name="Rechteck 4">
          <svg:title/>
          <svg:desc/>
          <text:p text:style-name="a426" text:class-names="" text:cond-style-name=""><text:span text:style-name="a425" text:class-names="">UNBEDINGT NOTWENDI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333in" svg:y="2.8125in" svg:width="4.84375in" svg:height="2.60417in" draw:id="id161" draw:style-name="a436" draw:name="Rechteck 5">
          <svg:title/>
          <svg:desc/>
          <text:p text:style-name="a429" text:class-names="" text:cond-style-name=""><text:span text:style-name="a428" text:class-names="">- Mehr Spots und Challenges bereitstellen</text:span></text:p>
          <text:p text:style-name="a431" text:class-names="" text:cond-style-name=""><text:span text:style-name="a430" text:class-names="">- Erstellung eigener Spots und Challenges konzipieren</text:span></text:p>
          <text:p text:style-name="a433" text:class-names="" text:cond-style-name=""><text:span text:style-name="a432" text:class-names="">- Lokale Speicherung ohne Login sicher und verständlich lösen</text:span></text:p>
          <text:p text:style-name="a435" text:class-names="" text:cond-style-name=""><text:span text:style-name="a434" text:class-names="">- Weitere Tests zu Design und Usability durchführ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708in" svg:y="1.85417in" svg:width="5.67708in" svg:height="4.375in" draw:id="id162" draw:style-name="a437" draw:name="Rechteck: abgerundete Ecken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2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28125in" svg:y="2.20833in" svg:width="4.84375in" svg:height="0.29167in" draw:id="id163" draw:style-name="a440" draw:name="Rechteck 7">
          <svg:title/>
          <svg:desc/>
          <text:p text:style-name="a439" text:class-names="" text:cond-style-name=""><text:span text:style-name="a438" text:class-names="">SPÄTER SINNVO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125in" svg:y="2.8125in" svg:width="4.84375in" svg:height="2.60417in" draw:id="id164" draw:style-name="a449" draw:name="Rechteck 8">
          <svg:title/>
          <svg:desc/>
          <text:p text:style-name="a442" text:class-names="" text:cond-style-name=""><text:span text:style-name="a441" text:class-names="">- User-generierte Inhalte moderieren</text:span></text:p>
          <text:p text:style-name="a444" text:class-names="" text:cond-style-name=""><text:span text:style-name="a443" text:class-names="">- Datenhaltung für mehrere Geräte weiterentwickeln</text:span></text:p>
          <text:p text:style-name="a446" text:class-names="" text:cond-style-name=""><text:span text:style-name="a445" text:class-names="">- Hosting, Datenschutz und Sicherheit produktionsreif prüfen</text:span></text:p>
          <text:p text:style-name="a448" text:class-names="" text:cond-style-name=""><text:span text:style-name="a447" text:class-names="">- Veröffentlichungsprozess vorberei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165" draw:style-name="a452" draw:name="Rechteck 9">
          <svg:title/>
          <svg:desc/>
          <text:p text:style-name="a451" text:class-names="" text:cond-style-name=""><text:span text:style-name="a450" text:class-names="">Designentscheidung bleibt: kein Registrierungszwang - direkter Einstieg statt E-Mail-Hürd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66" draw:style-name="a455" draw:name="Rechteck 10">
          <svg:title/>
          <svg:desc/>
          <text:p text:style-name="a454" text:class-names="" text:cond-style-name=""><text:span text:style-name="a453" text:class-names="">PK-Trace <text:s text:c="1"/>/ <text:s text:c="1"/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459" draw:name="Textfeld 12" svg:x="0.00012in" svg:y="7.2128in" svg:width="2.27634in" svg:height="0.2861in">
          <draw:text-box>
            <text:p text:style-name="a458" text:class-names="" text:cond-style-name="" text:id="id167"><text:span text:style-name="a456" text:class-names="">[UGC] - User Generated Content</text:span><text:span text:style-name="a457" text:class-names=""/></text:p>
          </draw:text-box>
          <svg:title/>
          <svg:desc/>
        </draw:frame>
        <presentation:notes draw:style-name="a463">
          <draw:page-thumbnail draw:page-number="10" svg:x="0in" svg:y="0in" svg:width="0in" svg:height="0in" presentation:class="page" draw:id="id169" presentation:style-name="a460" draw:name="Slide Image Placeholder 1">
            <svg:title/>
            <svg:desc/>
          </draw:page-thumbnail>
          <draw:frame draw:id="id170" presentation:style-name="a461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71" presentation:style-name="a462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1" draw:style-name="a464" draw:master-page-name="Master1-Layout1-title-Title-Slide" presentation:presentation-page-layout-name="Master1-PPL1" draw:id="Slide-266">
        <draw:custom-shape svg:x="0.72917in" svg:y="0.44792in" svg:width="8.33333in" svg:height="0.27083in" draw:id="id172" draw:style-name="a467" draw:name="Rechteck 17">
          <svg:title/>
          <svg:desc/>
          <text:p text:style-name="a466" text:class-names="" text:cond-style-name=""><text:span text:style-name="a465" text:class-names="">FAZIT AUS KURS UND TEAMARB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73" draw:style-name="a470" draw:name="slide-title">
          <svg:title/>
          <svg:desc/>
          <text:p text:style-name="a469" text:class-names="" text:cond-style-name=""><text:span text:style-name="a468" text:class-names="">Das wichtigste Learning: kleiner starten, sauberer liefer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74" draw:style-name="a471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625in" svg:height="1.875in" draw:id="id175" draw:style-name="a472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2.11458in" svg:width="4.94792in" svg:height="0.33333in" draw:id="id176" draw:style-name="a475" draw:name="Rechteck 4">
          <svg:title/>
          <svg:desc/>
          <text:p text:style-name="a474" text:class-names="" text:cond-style-name=""><text:span text:style-name="a473" text:class-names="">Was gut lie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2.65625in" svg:width="4.94792in" svg:height="0.75in" draw:id="id177" draw:style-name="a480" draw:name="Rechteck 5">
          <svg:title/>
          <svg:desc/>
          <text:p text:style-name="a477" text:class-names="" text:cond-style-name=""><text:span text:style-name="a476" text:class-names="">Paralleles Programmieren im Team</text:span></text:p>
          <text:p text:style-name="a479" text:class-names="" text:cond-style-name=""><text:span text:style-name="a478" text:class-names="">Hilfreiches Feedback im Ku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1.85417in" svg:width="5.625in" svg:height="1.875in" draw:id="id178" draw:style-name="a481" draw:name="Rechteck: abgerundete Ecken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7917in" svg:y="2.11458in" svg:width="4.94792in" svg:height="0.33333in" draw:id="id179" draw:style-name="a484" draw:name="Rechteck 7">
          <svg:title/>
          <svg:desc/>
          <text:p text:style-name="a483" text:class-names="" text:cond-style-name=""><text:span text:style-name="a482" text:class-names="">Was schwierig w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7917in" svg:y="2.65625in" svg:width="4.94792in" svg:height="0.75in" draw:id="id180" draw:style-name="a489" draw:name="Rechteck 8">
          <svg:title/>
          <svg:desc/>
          <text:p text:style-name="a486" text:class-names="" text:cond-style-name=""><text:span text:style-name="a485" text:class-names="">Kommunikation war manchmal schwierig</text:span></text:p>
          <text:p text:style-name="a488" text:class-names="" text:cond-style-name=""><text:span text:style-name="a487" text:class-names="">User-Journey-Iterationen dauerten zu la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4.04167in" svg:width="5.625in" svg:height="1.875in" draw:id="id181" draw:style-name="a490" draw:name="Rechteck: abgerundete Ecken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4.30208in" svg:width="4.94792in" svg:height="0.33333in" draw:id="id182" draw:style-name="a493" draw:name="Rechteck 10">
          <svg:title/>
          <svg:desc/>
          <text:p text:style-name="a492" text:class-names="" text:cond-style-name=""><text:span text:style-name="a491" text:class-names="">Was wir gelernt hab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4.84375in" svg:width="4.94792in" svg:height="0.75in" draw:id="id183" draw:style-name="a498" draw:name="Rechteck 11">
          <svg:title/>
          <svg:desc/>
          <text:p text:style-name="a495" text:class-names="" text:cond-style-name=""><text:span text:style-name="a494" text:class-names="">Planung und Design brauchen Zeit</text:span></text:p>
          <text:p text:style-name="a497" text:class-names="" text:cond-style-name=""><text:span text:style-name="a496" text:class-names="">Wireframes zeigen Funktion vor Schönh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04167in" svg:width="5.625in" svg:height="1.875in" draw:id="id184" draw:style-name="a499" draw:name="Rechteck: abgerundete Ecken 1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7917in" svg:y="4.30208in" svg:width="4.94792in" svg:height="0.33333in" draw:id="id185" draw:style-name="a502" draw:name="Rechteck 13">
          <svg:title/>
          <svg:desc/>
          <text:p text:style-name="a501" text:class-names="" text:cond-style-name=""><text:span text:style-name="a500" text:class-names="">Was wir künftig änder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7917in" svg:y="4.84375in" svg:width="4.94792in" svg:height="0.75in" draw:id="id186" draw:style-name="a507" draw:name="Rechteck 14">
          <svg:title/>
          <svg:desc/>
          <text:p text:style-name="a504" text:class-names="" text:cond-style-name=""><text:span text:style-name="a503" text:class-names="">Konservatives MVP planen</text:span></text:p>
          <text:p text:style-name="a506" text:class-names="" text:cond-style-name=""><text:span text:style-name="a505" text:class-names="">Wenige Features sehr gut umsetz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5417in" draw:id="id187" draw:style-name="a510" draw:name="Rechteck 15">
          <svg:title/>
          <svg:desc/>
          <text:p text:style-name="a509" text:class-names="" text:cond-style-name=""><text:span text:style-name="a508" text:class-names="">Feature Creep vermeiden: erst ein klares Fundament, dann gezielt erweiter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88" draw:style-name="a513" draw:name="Rechteck 16">
          <svg:title/>
          <svg:desc/>
          <text:p text:style-name="a512" text:class-names="" text:cond-style-name=""><text:span text:style-name="a511" text:class-names="">PK-Trace <text:s text:c="1"/>/ <text:s text:c="1"/>1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draw:style-name="a519" draw:name="Textfeld 19" svg:x="0.00012in" svg:y="7.2128in" svg:width="2.27634in" svg:height="0.2861in">
          <draw:text-box>
            <text:p text:style-name="a518" text:class-names="" text:cond-style-name=""><text:span text:style-name="a514" text:class-names="">[MVP]</text:span><text:span text:style-name="a515" text:class-names=""><text:s text:c="1"/>-<text:s text:c="1"/></text:span><text:span text:style-name="a516" text:class-names="">Minimum Viable<text:s text:c="1"/></text:span><text:span text:style-name="a517" text:class-names="">Product</text:span></text:p>
          </draw:text-box>
          <svg:title/>
          <svg:desc/>
        </draw:frame>
        <presentation:notes draw:style-name="a523">
          <draw:page-thumbnail draw:page-number="11" svg:x="0in" svg:y="0in" svg:width="0in" svg:height="0in" presentation:class="page" draw:id="id190" presentation:style-name="a520" draw:name="Slide Image Placeholder 1">
            <svg:title/>
            <svg:desc/>
          </draw:page-thumbnail>
          <draw:frame draw:id="id191" presentation:style-name="a521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92" presentation:style-name="a522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2" draw:style-name="a524" draw:master-page-name="Master1-Layout1-title-Title-Slide" presentation:presentation-page-layout-name="Master1-PPL1" draw:id="Slide-267">
        <draw:custom-shape svg:x="0in" svg:y="0in" svg:width="0.1875in" svg:height="7.5in" draw:id="id193" draw:style-name="a525" draw:name="Rechteck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1.25in" svg:width="11.66667in" svg:height="0.35417in" draw:id="id194" draw:style-name="a528" draw:name="Rechteck 1">
          <svg:title/>
          <svg:desc/>
          <text:p text:style-name="a527" text:class-names="" text:cond-style-name=""><text:span text:style-name="a526" text:class-names="">PK-TR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1.97917in" svg:width="11.25in" svg:height="2.39583in" draw:id="id195" draw:style-name="a542" draw:name="Rechteck 2">
          <svg:title/>
          <svg:desc/>
          <text:p text:style-name="a531" text:class-names="" text:cond-style-name=""><text:span text:style-name="a529" text:class-names="">Finde Spots. </text:span><text:span text:style-name="a530" text:class-names=""/></text:p>
          <text:p text:style-name="a535" text:class-names="" text:cond-style-name=""><text:span text:style-name="a532" text:class-names="">Meistere</text:span><text:span text:style-name="a533" text:class-names=""> Challenges. </text:span><text:span text:style-name="a534" text:class-names=""/></text:p>
          <text:p text:style-name="a541" text:class-names="" text:cond-style-name=""><text:span text:style-name="a536" text:class-names="">Verbessere</text:span><text:span text:style-name="a537" text:class-names=""> </text:span><text:span text:style-name="a538" text:class-names="">deinen</text:span><text:span text:style-name="a539" text:class-names=""> Flow.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6.25in" svg:width="11.25in" svg:height="0.4375in" draw:id="id196" draw:style-name="a548" draw:name="Rechteck 4">
          <svg:title/>
          <svg:desc/>
          <text:p text:style-name="a547" text:class-names="" text:cond-style-name=""><text:span text:style-name="a543" text:class-names="">Fragen</text:span><text:span text:style-name="a544" text:class-names="">?</text:span><text:span text:style-name="a545" text:class-names=""><text:s text:c="1"/>Fragen!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52">
          <draw:page-thumbnail draw:page-number="12" svg:x="0in" svg:y="0in" svg:width="0in" svg:height="0in" presentation:class="page" draw:id="id197" presentation:style-name="a549" draw:name="Slide Image Placeholder 1">
            <svg:title/>
            <svg:desc/>
          </draw:page-thumbnail>
          <draw:frame draw:id="id198" presentation:style-name="a550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99" presentation:style-name="a551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ChatGPT" style:page-layout-name="pageLayout1" draw:style-name="a0">
      <presentation:notes style:page-layout-name="pageLayout2" draw:style-name="a17">
        <draw:frame draw:id="id0" presentation:style-name="a3" draw:name="Header Placeholder" svg:x="0in" svg:y="0in" svg:width="0in" svg:height="0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6" draw:name="Date Placeholder" svg:x="0in" svg:y="0in" svg:width="0in" svg:height="0in" presentation:class="date-time" presentation:placeholder="false">
          <draw:text-box>
            <text:p text:style-name="a5" text:class-names="" text:cond-style-name=""><text:span text:style-name="a4" text:class-names=""/></text:p>
          </draw:text-box>
          <svg:title/>
          <svg:desc/>
        </draw:frame>
        <draw:page-thumbnail svg:x="0in" svg:y="0in" svg:width="0in" svg:height="0in" presentation:class="page" draw:id="id2" presentation:style-name="a7" draw:name="Slide Image Placeholder">
          <svg:title/>
          <svg:desc/>
        </draw:page-thumbnail>
        <draw:frame draw:id="id3" presentation:style-name="a10" draw:name="Notes Placeholder" svg:x="0in" svg:y="0in" svg:width="0in" svg:height="0in" presentation:class="notes" presentation:placeholder="false">
          <draw:text-box>
            <text:p text:style-name="a9" text:class-names="" text:cond-style-name=""><text:span text:style-name="a8" text:class-names=""/></text:p>
          </draw:text-box>
          <svg:title/>
          <svg:desc/>
        </draw:frame>
        <draw:frame draw:id="id4" presentation:style-name="a13" draw:name="Footer Placeholder" svg:x="0in" svg:y="0in" svg:width="0in" svg:height="0in" presentation:class="foot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5" presentation:style-name="a16" draw:name="Slide Number Placeholder" svg:x="0in" svg:y="0in" svg:width="0in" svg:height="0in" presentation:class="page-numb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8">
      <presentation:notes style:page-layout-name="pageLayout2" draw:style-name="a35">
        <draw:frame draw:id="id0" presentation:style-name="a21" draw:name="Header Placeholder" svg:x="0in" svg:y="0in" svg:width="0in" svg:height="0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1" presentation:style-name="a24" draw:name="Date Placeholder" svg:x="0in" svg:y="0in" svg:width="0in" svg:height="0in" presentation:class="date-time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page-thumbnail svg:x="0in" svg:y="0in" svg:width="0in" svg:height="0in" presentation:class="page" draw:id="id2" presentation:style-name="a25" draw:name="Slide Image Placeholder">
          <svg:title/>
          <svg:desc/>
        </draw:page-thumbnail>
        <draw:frame draw:id="id3" presentation:style-name="a28" draw:name="Notes Placeholder" svg:x="0in" svg:y="0in" svg:width="0in" svg:height="0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4" presentation:style-name="a31" draw:name="Footer Placeholder" svg:x="0in" svg:y="0in" svg:width="0in" svg:height="0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5" presentation:style-name="a34" draw:name="Slide Number Placeholder" svg:x="0in" svg:y="0in" svg:width="0in" svg:height="0in" presentation:class="page-numb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tion</dc:title>
    <meta:initial-creator>Walnut Exporter</meta:initial-creator>
    <dc:creator>Walnut Exporter</dc:creator>
    <meta:creation-date>2026-07-20T15:34:58Z</meta:creation-date>
    <dc:date>2026-07-20T16:10:29Z</dc:date>
    <meta:editing-cycles>52</meta:editing-cycles>
  </office:meta>
</office:document-meta>
</file>